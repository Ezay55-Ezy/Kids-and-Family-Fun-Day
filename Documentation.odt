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ids &amp; Family Fun Day Kenya</text:h>
      <text:h text:style-name="Heading_20_2" text:outline-level="2">Event Management Platform</text:h>
      <text:h text:style-name="Heading_20_3" text:outline-level="3">Bringing Families Together Through Smarter Event Management</text:h>
      <text:p text:style-name="Text_20_body"><text:span text:style-name="Strong_20_Emphasis">Kids &amp; Family Fun Day Kenya</text:span> is a modern event management platform designed to help organizers plan, promote, and manage family-focused events from one secure, easy-to-use system.</text:p>
      <text:p text:style-name="Text_20_body">Whether you're organizing a fun day, school event, children's festival, community celebration, or corporate family event, our platform streamlines operations while creating a seamless experience for attendees.</text:p>
      <text:p text:style-name="Horizontal_20_Line"/>
      <text:h text:style-name="Heading_20_1" text:outline-level="1">The Challenge</text:h>
      <text:p text:style-name="Text_20_body">Many event organizers still rely on manual processes that consume time and increase the risk of mistakes.</text:p>
      <text:p text:style-name="Text_20_body">Common challenges include:</text:p>
      <text:list text:style-name="L1">
        <text:list-item>
          <text:p text:style-name="P1">Managing registrations through phone calls, WhatsApp, or spreadsheets.</text:p>
        </text:list-item>
        <text:list-item>
          <text:p text:style-name="P1">Promoting events across multiple platforms without a central hub.</text:p>
        </text:list-item>
        <text:list-item>
          <text:p text:style-name="P1">Tracking payments manually.</text:p>
        </text:list-item>
        <text:list-item>
          <text:p text:style-name="P1">Communicating updates to attendees.</text:p>
        </text:list-item>
        <text:list-item>
          <text:p text:style-name="P1">Managing vendors and event information separately.</text:p>
        </text:list-item>
        <text:list-item>
          <text:p text:style-name="P1">Limited reporting on event performance.</text:p>
        </text:list-item>
      </text:list>
      <text:p text:style-name="Text_20_body">These challenges can lead to lost sales, administrative overhead, and a frustrating customer experience.</text:p>
      <text:p text:style-name="Horizontal_20_Line"/>
      <text:h text:style-name="Heading_20_1" text:outline-level="1">Our Solution</text:h>
      <text:p text:style-name="Text_20_body">Kids &amp; Family Fun Day Kenya provides an all-in-one platform that simplifies event management while helping organizers deliver memorable experiences.</text:p>
      <text:p text:style-name="Text_20_body">The platform enables organizers to:</text:p>
      <text:list text:style-name="L2">
        <text:list-item>
          <text:p text:style-name="P2">Publish upcoming events.</text:p>
        </text:list-item>
        <text:list-item>
          <text:p text:style-name="P2">Showcase galleries and past events.</text:p>
        </text:list-item>
        <text:list-item>
          <text:p text:style-name="P2"><text:soft-page-break/>Manage attendee registrations.</text:p>
        </text:list-item>
        <text:list-item>
          <text:p text:style-name="P2">Sell tickets online.</text:p>
        </text:list-item>
        <text:list-item>
          <text:p text:style-name="P2">Accept secure M-Pesa payments.</text:p>
        </text:list-item>
        <text:list-item>
          <text:p text:style-name="P2">Manage vendors and event information.</text:p>
        </text:list-item>
        <text:list-item>
          <text:p text:style-name="P2">Communicate with attendees.</text:p>
        </text:list-item>
        <text:list-item>
          <text:p text:style-name="P2">Monitor bookings and generate reports.</text:p>
        </text:list-item>
        <text:list-item>
          <text:p text:style-name="P2">Manage everything through a secure administrative dashboard.</text:p>
        </text:list-item>
      </text:list>
      <text:p text:style-name="Horizontal_20_Line"/>
      <text:h text:style-name="Heading_20_1" text:outline-level="1">Key Features</text:h>
      <text:h text:style-name="Heading_20_2" text:outline-level="2">Public Website</text:h>
      <text:list text:style-name="L3">
        <text:list-item>
          <text:p text:style-name="P3">Professional homepage</text:p>
        </text:list-item>
        <text:list-item>
          <text:p text:style-name="P3">About page</text:p>
        </text:list-item>
        <text:list-item>
          <text:p text:style-name="P3">Services section</text:p>
        </text:list-item>
        <text:list-item>
          <text:p text:style-name="P3">Event listings</text:p>
        </text:list-item>
        <text:list-item>
          <text:p text:style-name="P3">Event details</text:p>
        </text:list-item>
        <text:list-item>
          <text:p text:style-name="P3">Photo gallery</text:p>
        </text:list-item>
        <text:list-item>
          <text:p text:style-name="P3">Contact page</text:p>
        </text:list-item>
      </text:list>
      <text:h text:style-name="Heading_20_2" text:outline-level="2">Customer Features</text:h>
      <text:list text:style-name="L4">
        <text:list-item>
          <text:p text:style-name="P4">Secure account registration</text:p>
        </text:list-item>
        <text:list-item>
          <text:p text:style-name="P4">Login and account management</text:p>
        </text:list-item>
        <text:list-item>
          <text:p text:style-name="P4">Ticket purchasing</text:p>
        </text:list-item>
        <text:list-item>
          <text:p text:style-name="P4">Booking history</text:p>
        </text:list-item>
        <text:list-item>
          <text:p text:style-name="P4">Email confirmations</text:p>
        </text:list-item>
      </text:list>
      <text:h text:style-name="Heading_20_2" text:outline-level="2">Administration</text:h>
      <text:list text:style-name="L5">
        <text:list-item>
          <text:p text:style-name="P5">Event management</text:p>
        </text:list-item>
        <text:list-item>
          <text:p text:style-name="P5">User management</text:p>
        </text:list-item>
        <text:list-item>
          <text:p text:style-name="P5">Gallery management</text:p>
        </text:list-item>
        <text:list-item>
          <text:p text:style-name="P5"><text:soft-page-break/>Vendor management</text:p>
        </text:list-item>
        <text:list-item>
          <text:p text:style-name="P5">Reports and analytics</text:p>
        </text:list-item>
        <text:list-item>
          <text:p text:style-name="P5">Content management</text:p>
        </text:list-item>
      </text:list>
      <text:h text:style-name="Heading_20_2" text:outline-level="2">Payments</text:h>
      <text:list text:style-name="L6">
        <text:list-item>
          <text:p text:style-name="P6">M-Pesa integration</text:p>
        </text:list-item>
        <text:list-item>
          <text:p text:style-name="P6">Secure payment confirmation</text:p>
        </text:list-item>
        <text:list-item>
          <text:p text:style-name="P6">Digital receipts</text:p>
        </text:list-item>
        <text:list-item>
          <text:p text:style-name="P6">Booking verification</text:p>
        </text:list-item>
      </text:list>
      <text:p text:style-name="Horizontal_20_Line"/>
      <text:h text:style-name="Heading_20_1" text:outline-level="1">Benefits</text:h>
      <text:p text:style-name="Text_20_body">Choosing Kids &amp; Family Fun Day Kenya means investing in a platform built to support growth.</text:p>
      <text:p text:style-name="Text_20_body">Benefits include:</text:p>
      <text:list text:style-name="L7">
        <text:list-item>
          <text:p text:style-name="P7">Professional online presence</text:p>
        </text:list-item>
        <text:list-item>
          <text:p text:style-name="P7">Increased visibility for events</text:p>
        </text:list-item>
        <text:list-item>
          <text:p text:style-name="P7">Faster registration process</text:p>
        </text:list-item>
        <text:list-item>
          <text:p text:style-name="P7">Improved customer experience</text:p>
        </text:list-item>
        <text:list-item>
          <text:p text:style-name="P7">Reduced paperwork</text:p>
        </text:list-item>
        <text:list-item>
          <text:p text:style-name="P7">Better organization and reporting</text:p>
        </text:list-item>
        <text:list-item>
          <text:p text:style-name="P7">Secure online payments</text:p>
        </text:list-item>
        <text:list-item>
          <text:p text:style-name="P7">Mobile-friendly access from anywhere</text:p>
        </text:list-item>
        <text:list-item>
          <text:p text:style-name="P7">Scalable architecture for future expansion</text:p>
        </text:list-item>
      </text:list>
      <text:p text:style-name="Horizontal_20_Line"/>
      <text:h text:style-name="Heading_20_1" text:outline-level="1">Why Choose Our Platform?</text:h>
      <text:p text:style-name="Text_20_body">Our platform is built using modern technologies and industry best practices to provide a secure, reliable, and high-performing experience.</text:p>
      <text:p text:style-name="Text_20_body">Highlights include:</text:p>
      <text:list text:style-name="L8">
        <text:list-item>
          <text:p text:style-name="P8">Modern cloud-based architecture</text:p>
        </text:list-item>
        <text:list-item>
          <text:p text:style-name="P8"><text:soft-page-break/>Responsive design for desktop, tablet, and mobile</text:p>
        </text:list-item>
        <text:list-item>
          <text:p text:style-name="P8">Secure authentication</text:p>
        </text:list-item>
        <text:list-item>
          <text:p text:style-name="P8">Reliable data management</text:p>
        </text:list-item>
        <text:list-item>
          <text:p text:style-name="P8">Easy maintenance and future enhancements</text:p>
        </text:list-item>
        <text:list-item>
          <text:p text:style-name="P8">Designed for long-term scalability</text:p>
        </text:list-item>
      </text:list>
      <text:p text:style-name="Horizontal_20_Line"/>
      <text:h text:style-name="Heading_20_1" text:outline-level="1">Investment</text:h>
      <text:h text:style-name="Heading_20_2" text:outline-level="2">Complete Event Management Platform</text:h>
      <text:p text:style-name="Text_20_body">The solution includes:</text:p>
      <text:list text:style-name="L9">
        <text:list-item>
          <text:p text:style-name="P9">Professional website</text:p>
        </text:list-item>
        <text:list-item>
          <text:p text:style-name="P9">Event management system</text:p>
        </text:list-item>
        <text:list-item>
          <text:p text:style-name="P9">Customer accounts</text:p>
        </text:list-item>
        <text:list-item>
          <text:p text:style-name="P9">Administrative dashboard</text:p>
        </text:list-item>
        <text:list-item>
          <text:p text:style-name="P9">Gallery management</text:p>
        </text:list-item>
        <text:list-item>
          <text:p text:style-name="P9">Contact management</text:p>
        </text:list-item>
        <text:list-item>
          <text:p text:style-name="P9">M-Pesa payment integration</text:p>
        </text:list-item>
        <text:list-item>
          <text:p text:style-name="P9">Deployment assistance</text:p>
        </text:list-item>
      </text:list>
      <text:p text:style-name="Text_20_body"><text:span text:style-name="Strong_20_Emphasis">Project Investment:</text:span> <text:span text:style-name="Strong_20_Emphasis">KSh 150,000</text:span></text:p>
      <text:h text:style-name="Heading_20_3" text:outline-level="3">Flexible Payment Options</text:h>
      <text:list text:style-name="L10">
        <text:list-item>
          <text:p text:style-name="P10">Initial deposit before project commencement.</text:p>
        </text:list-item>
        <text:list-item>
          <text:p text:style-name="P10">Remaining balance payable according to agreed milestones or an approved installment plan.</text:p>
        </text:list-item>
      </text:list>
      <text:p text:style-name="Horizontal_20_Line"/>
      <text:h text:style-name="Heading_20_1" text:outline-level="1">Our Commitment</text:h>
      <text:p text:style-name="Text_20_body">We don't simply deliver a website.</text:p>
      <text:p text:style-name="Text_20_body">We deliver a professional event management platform designed to help organizations operate more efficiently, improve customer satisfaction, and support future growth.</text:p>
      <text:p text:style-name="Horizontal_20_Line"/>
      <text:h text:style-name="Heading_20_1" text:outline-level="1"><text:soft-page-break/>Let's Build Your Next Successful Event</text:h>
      <text:p text:style-name="Text_20_body">If you're ready to modernize the way you organize and manage events, we'd love to discuss your requirements and demonstrate how Kids &amp; Family Fun Day Kenya can support your goals.</text:p>
      <text:p text:style-name="Text_20_body"><text:span text:style-name="Strong_20_Emphasis">Contact Us</text:span></text:p>
      <text:p text:style-name="Text_20_body">Phone: ______________________</text:p>
      <text:p text:style-name="Text_20_body">Email: ______________________</text:p>
      <text:p text:style-name="Text_20_body">Website: ____________________</text:p>
      <text:p text:style-name="Text_20_body">Location: Kenya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4T21:35:58.967733750</meta:creation-date>
    <dc:date>2026-07-04T21:40:12.617263533</dc:date>
    <meta:editing-duration>PT4M14S</meta:editing-duration>
    <meta:editing-cycles>1</meta:editing-cycles>
    <meta:document-statistic meta:table-count="0" meta:image-count="0" meta:object-count="0" meta:page-count="5" meta:paragraph-count="100" meta:word-count="550" meta:character-count="3770" meta:non-whitespace-character-count="3382"/>
    <meta:generator>LibreOffice/26.2.3.2$Linux_X86_64 LibreOffice_project/620$Build-2</meta:generator>
  </office:meta>
</office:document-meta>
</file>